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SD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Procyberian’s Distribu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nside the dialectic of BSD, proprietary solutions and GNU approach.</text:p>
              </text:list-item>
              <text:list-item>
                <text:p>How to approach to the information to embrace newbies to become master of hacking !</text:p>
              </text:list-item>
              <text:list-item>
                <text:p>Why Procyberian Systems Distribution not only “system” ?</text:p>
              </text:list-item>
              <text:list-item>
                <text:p>A community for other communities a company for other companies. This is our culture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efore start : PSD is an umbrella project.</text:p>
              </text:list-item>
              <text:list-item>
                <text:p>GNU/Linux is the first stable goal. We want to write more freedom respecting security software.</text:p>
              </text:list-item>
              <text:list-item>
                <text:p>GNU/Hurd is on the way.</text:p>
              </text:list-item>
              <text:list-item>
                <text:p>Also we want to learn from BSDs.</text:p>
              </text:list-item>
              <text:list-item>
                <text:p>AGPLv3-or-later to escape from vendor lock-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SD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Last say : PSD will always be freedom respecting and under control of community memb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16:56:04.535850147</meta:creation-date>
    <meta:editing-duration>PT8M9S</meta:editing-duration>
    <meta:editing-cycles>19</meta:editing-cycles>
    <meta:generator>LibreOffice/24.2.7.2$Linux_X86_64 LibreOffice_project/420$Build-2</meta:generator>
    <dc:title>DNA</dc:title>
    <dc:date>2026-05-05T17:04:20.646660738</dc:date>
    <meta:document-statistic meta:object-count="122"/>
  </office:meta>
</office:document-meta>
</file>